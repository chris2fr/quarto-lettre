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Objet de la lettre</text:p>
      <text:p text:style-name="Author">Prénom Nom</text:p>
      <text:p text:style-name="Date">2026-05-22</text:p>
      <text:p text:style-name="FigureWithCaption"><draw:frame draw:name="img1" svg:width="9257.142857142857pt" svg:height="1542.857142857143pt"><draw:image xlink:href="Pictures/0.png" xlink:type="simple" xlink:show="embed" xlink:actuate="onLoad"/></draw:frame></text:p>
      <text:p text:style-name="FigureCaption"><text:span text:style-name="T1">Les Grands Voisins</text:span> — Association d’intérêt général</text:p>
      <text:list text:style-name="L1">
        <text:list-item>
          <text:p text:style-name="P1">Participant 1</text:p>
        </text:list-item>
        <text:list-item>
          <text:p text:style-name="P1">Participant 2</text:p>
        </text:list-item>
      </text:list>
      <text:list text:style-name="L2">
        <text:list-item>
          <text:p text:style-name="P2">Point 1</text:p>
        </text:list-item>
        <text:list-item>
          <text:p text:style-name="P2">Point 2</text:p>
        </text:list-item>
      </text:list>
      <text:list text:style-name="L3">
        <text:list-item>
          <text:p text:style-name="P3">Décision 1</text:p>
        </text:list-item>
        <text:list-item>
          <text:p text:style-name="P3">Décision 2</text:p>
        </text:list-item>
      </text:list>
      <text:list text:style-name="L4">
        <text:list-item>
          <text:p text:style-name="P4">Action 1</text:p>
        </text:list-item>
        <text:list-item>
          <text:p text:style-name="P4">Action 2</text:p>
        </text:list-item>
      </text:list>
      <text:list text:style-name="L5">
        <text:list-item>
          <text:p text:style-name="P5">Date de la prochaine réunion</text:p>
        </text:list-item>
      </text:list>
      <text:p text:style-name="First_20_paragraph">Compte-rende en attente d’approbation.</text:p>
      <text:h text:style-name="Heading_20_1" text:outline-level="1"><text:bookmark-start text:name="notes-de-réunion"/>Notes de réunion<text:bookmark-end text:name="notes-de-réunion"/></text:h>
      <text:p text:style-name="First_20_paragraph">Notes de la réunion.</text:p>
      <text:p text:style-name="Text_20_body"><text:a xlink:type="simple" xlink:href="tel:+33781811811" office:name=""><text:span text:style-name="Definition">+33 7 81 81 18 11</text:span></text:a> — <text:a xlink:type="simple" xlink:href="mailto:chris@lesgrandsvoisins.com" office:name=""><text:span text:style-name="Definition">chris@lesgrandsvoisins.com</text:span></text:a> Siège : chez C. LHOMME - 146 bd de Montparnasse 75014 PARIS Association d’intérêt général de loi 1901 RNA W751240710 SIREN 832760102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fr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fr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fr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Objet de la lettre</dc:title>
    <dc:description/>
    <dc:subject/>
    <meta:keyword/>
    <dc:language>fr</dc:language>
    <meta:initial-creator>Prénom Nom</meta:initial-creator>
    <dc:creator>Prénom Nom</dc:creator>
    <meta:creation-date>2026-05-22T08:28:34Z</meta:creation-date>
    <dc:date>2026-05-22T08:28:34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date" meta:value-type="string">2026-05-22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place" meta:value-type="string">Paris</meta:user-defined>
    <meta:user-defined meta:name="toc-title" meta:value-type="string">Table des matières</meta:user-defined>
  </office:meta>
</office:document-meta>
</file>